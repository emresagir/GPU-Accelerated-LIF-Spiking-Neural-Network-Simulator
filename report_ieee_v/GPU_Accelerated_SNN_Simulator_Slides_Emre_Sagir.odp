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800000002CA89C1FD4085A513A2.png" manifest:media-type="image/png"/>
  <manifest:file-entry manifest:full-path="Pictures/1000020100000800000004CD7ADEF1BE0F58CFC2.png" manifest:media-type="image/png"/>
  <manifest:file-entry manifest:full-path="Pictures/100002010000080000000472097DABAFA96B09AF.png" manifest:media-type="image/png"/>
  <manifest:file-entry manifest:full-path="Pictures/100000000000016700000041FD4F0654DF362A1D.png" manifest:media-type="image/png"/>
  <manifest:file-entry manifest:full-path="Pictures/100000000000024300000174F998C52F9E7CFFAF.png" manifest:media-type="image/png"/>
  <manifest:file-entry manifest:full-path="Pictures/1000000000000196000000EA72B5968B319EA092.png" manifest:media-type="image/png"/>
  <manifest:file-entry manifest:full-path="Pictures/100000000000036C000002F03C346E231CCEC0C4.png" manifest:media-type="image/png"/>
  <manifest:file-entry manifest:full-path="Pictures/1000000000000250000001563E148FF83B952AC8.png" manifest:media-type="image/png"/>
  <manifest:file-entry manifest:full-path="Pictures/100000000000016300000046C0677893EFAE90AA.png" manifest:media-type="image/png"/>
  <manifest:file-entry manifest:full-path="Pictures/10000000000006400000031F51A4004FD60BCB28.png" manifest:media-type="image/png"/>
  <manifest:file-entry manifest:full-path="Pictures/1000000000000309000002036EDA3527BF3B1478.png" manifest:media-type="image/png"/>
  <manifest:file-entry manifest:full-path="Pictures/10000000000006400000031F01C980E0DEB5BF10.png" manifest:media-type="image/png"/>
  <manifest:file-entry manifest:full-path="Pictures/100000000000020C000001BB76D03D1FC479A48E.png" manifest:media-type="image/png"/>
  <manifest:file-entry manifest:full-path="Pictures/100000000000043F0000006E23D8E0FE885A494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a5b7c5" draw:textarea-vertical-align="middle" draw:auto-grow-height="false" draw:fit-to-size="false" style:shrink-to-fit="false" fo:min-height="0cm" fo:min-width="0cm" fo:padding-top="1.201cm" fo:padding-bottom="1.201cm" fo:padding-left="1.201cm" fo:padding-right="1.201cm" fo:wrap-option="wrap"/>
    </style:style>
    <style:style style:name="gr4" style:family="graphic" style:parent-style-name="standard">
      <style:graphic-properties draw:stroke="none" svg:stroke-width="0cm" draw:fill="solid" draw:fill-color="#445d73" draw:textarea-vertical-align="middle" draw:auto-grow-height="false" draw:fit-to-size="false" style:shrink-to-fit="false" fo:min-height="0cm" fo:min-width="0cm" fo:padding-top="1.201cm" fo:padding-bottom="1.201cm" fo:padding-left="1.201cm" fo:padding-right="1.201cm" fo:wrap-option="wrap"/>
    </style:style>
    <style:style style:name="gr5" style:family="graphic" style:parent-style-name="standard">
      <style:graphic-properties draw:stroke="none" svg:stroke-width="0cm" draw:fill="solid" draw:fill-color="#667e92" draw:textarea-vertical-align="middle" draw:auto-grow-height="false" draw:fit-to-size="false" style:shrink-to-fit="false" fo:min-height="0cm" fo:min-width="0cm" fo:padding-top="1.201cm" fo:padding-bottom="1.201cm" fo:padding-left="1.201cm" fo:padding-right="1.201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1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1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1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outline1" style:list-style-name="L1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outline1" style:list-style-name="L1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a5b7c5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445d73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667e92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2.3999996185303pt" fo:letter-spacing="normal" fo:font-style="normal" style:text-underline-style="none" fo:font-weight="normal" style:font-name-asian="Lato" style:font-size-asian="12.3999996185303pt" style:font-style-asian="normal" style:font-weight-asian="normal" style:font-name-complex="Lato" style:font-size-complex="12.3999996185303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6" style:family="text">
      <style:text-properties fo:font-variant="normal" fo:text-transform="none" fo:color="#1a1a1a" style:text-line-through-style="none" style:text-line-through-type="none" style:text-position="0% 100%" style:font-name="Raleway" fo:font-size="24.3999996185303pt" fo:letter-spacing="normal" fo:font-style="normal" style:text-underline-style="none" fo:font-weight="bold" style:font-name-asian="Raleway" style:font-size-asian="24.3999996185303pt" style:font-style-asian="normal" style:font-weight-asian="bold" style:font-name-complex="Raleway" style:font-size-complex="24.3999996185303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o" fo:font-size="15pt" fo:letter-spacing="normal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71cm" text:min-label-width="0.899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71cm" text:min-label-width="0.899cm"/>
        <style:text-properties style:font-name="Lato" fo:color="#595959" fo:font-size="100%"/>
      </text:list-level-style-bullet>
      <text:list-level-style-bullet text:level="2" text:bullet-char="-">
        <style:list-level-properties text:space-before="1.677cm" text:min-label-width="0.863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GPU-Accelerated </text:span><text:span text:style-name="T1"><text:line-break/></text:span><text:span text:style-name="T1">LIF Spiking Neural</text:span><text:span text:style-name="T1"><text:line-break/></text:span><text:span text:style-name="T1">Network Simulator</text:span><text:span text:style-name="T1"><text:line-break/></text:span><text:span text:style-name="T1"/></text:p>
          </draw:text-box>
        </draw:frame>
        <draw:frame draw:name="Google Shape;87;p13" presentation:style-name="pr2" draw:text-style-name="P4" draw:layer="layout" svg:width="21.355cm" svg:height="2.387cm" svg:x="2.022cm" svg:y="9.587cm" presentation:class="subtitle" presentation:user-transformed="true">
          <draw:text-box>
            <text:p text:style-name="P3"><text:span text:style-name="T2">Emre Sagir</text:span></text:p>
            <text:p text:style-name="P3"><text:span text:style-name="T2">Computer Engineering (GPU Programming Class)</text:span></text:p>
            <text:p text:style-name="P3"><text:span text:style-name="T2">Politecnico di Torino</text:span></text:p>
            <text:p text:style-name="P3"><text:span text:style-name="T2"/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. Background (Models)" draw:style-name="dp1" draw:master-page-name="TITLE_5f_AND_5f_BODY" presentation:presentation-page-layout-name="AL2T1">
        <draw:frame draw:name="Google Shape;92;p14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6"><text:span text:style-name="T3">I. Background (Models)</text:span></text:p>
          </draw:text-box>
        </draw:frame>
        <draw:frame draw:name="Google Shape;93;p14" presentation:style-name="pr5" draw:text-style-name="P10" draw:layer="layout" svg:width="21.357cm" svg:height="6.28cm" svg:x="2.026cm" svg:y="5.775cm" presentation:class="outline" presentation:user-transformed="true">
          <draw:text-box>
            <text:p text:style-name="P8"><text:span text:style-name="T4">A. Neuron Model</text:span></text:p>
            <text:p text:style-name="P9"><text:span text:style-name="T5"/></text:p>
          </draw:text-box>
        </draw:frame>
        <draw:frame draw:name="Google Shape;94;p14" draw:style-name="gr2" draw:text-style-name="P11" draw:layer="layout" svg:width="9.392cm" svg:height="1.851cm" svg:x="13.639cm" svg:y="7.989cm">
          <draw:image xlink:href="Pictures/100000000000016300000046C0677893EFAE90AA.png" xlink:type="simple" xlink:show="embed" xlink:actuate="onLoad">
            <text:p/>
          </draw:image>
        </draw:frame>
        <draw:frame draw:name="Google Shape;95;p14" presentation:style-name="pr5" draw:text-style-name="P10" draw:layer="layout" svg:width="9.521cm" svg:height="6.872cm" svg:x="13.371cm" svg:y="5.775cm" presentation:class="outline" presentation:user-transformed="true">
          <draw:text-box>
            <text:p text:style-name="P12"><text:span text:style-name="T4">B. Synapse Model</text:span></text:p>
          </draw:text-box>
        </draw:frame>
        <draw:frame draw:name="Google Shape;96;p14" draw:style-name="gr2" draw:text-style-name="P11" draw:layer="layout" svg:width="10.741cm" svg:height="6.19cm" svg:x="1.693cm" svg:y="7.144cm">
          <draw:image xlink:href="Pictures/1000000000000196000000EA72B5968B319EA092.png" xlink:type="simple" xlink:show="embed" xlink:actuate="onLoad">
            <text:p/>
          </draw:image>
        </draw:frame>
        <draw:frame draw:name="Google Shape;97;p14" presentation:style-name="pr5" draw:text-style-name="P10" draw:layer="layout" svg:width="9.521cm" svg:height="6.872cm" svg:x="13.639cm" svg:y="9.439cm" presentation:class="outline" presentation:user-transformed="true">
          <draw:text-box>
            <text:p text:style-name="P12"><text:span text:style-name="T4">C. Merge</text:span></text:p>
          </draw:text-box>
        </draw:frame>
        <draw:frame draw:name="Google Shape;98;p14" draw:style-name="gr2" draw:text-style-name="P11" draw:layer="layout" svg:width="9.498cm" svg:height="1.719cm" svg:x="13.382cm" svg:y="10.928cm">
          <draw:image xlink:href="Pictures/100000000000016700000041FD4F0654DF362A1D.png" xlink:type="simple" xlink:show="embed" xlink:actuate="onLoad">
            <text:p/>
          </draw:image>
        </draw:frame>
        <presentation:notes draw:style-name="dp2">
          <draw:page-thumbnail draw:name="Google Shape;89;g3ef6620537b_0_125:notes" draw:style-name="gr1" draw:layer="layout" svg:width="16.932cm" svg:height="9.524cm" svg:x="1.059cm" svg:y="1.905cm" draw:page-number="2" presentation:class="page"/>
          <draw:frame draw:name="Google Shape;90;g3ef6620537b_0_12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. Proposed Method" draw:style-name="dp1" draw:master-page-name="TITLE_5f_AND_5f_BODY" presentation:presentation-page-layout-name="AL2T1">
        <draw:frame draw:name="Google Shape;103;p15" presentation:style-name="pr7" draw:text-style-name="P7" draw:layer="layout" svg:width="21.357cm" svg:height="1.486cm" svg:x="2.026cm" svg:y="3.663cm" presentation:class="title" presentation:user-transformed="true">
          <draw:text-box>
            <text:p text:style-name="P6"><text:span text:style-name="T6">II. Proposed Method</text:span></text:p>
          </draw:text-box>
        </draw:frame>
        <draw:frame draw:name="Google Shape;104;p15" presentation:style-name="pr5" draw:text-style-name="P10" draw:layer="layout" svg:width="21.357cm" svg:height="6.28cm" svg:x="2.026cm" svg:y="5.775cm" presentation:class="outline" presentation:user-transformed="true">
          <draw:text-box>
            <text:p text:style-name="P8"><text:span text:style-name="T7">1- Exploiting the GPU’s parallel computing power</text:span></text:p>
            <text:p text:style-name="P13"><text:span text:style-name="T7">2- Different models, same work.</text:span></text:p>
            <text:p text:style-name="P9"><text:span text:style-name="T7">3- Results and Discussion</text:span></text:p>
          </draw:text-box>
        </draw:frame>
        <draw:g draw:name="Google Shape;105;p15">
          <draw:custom-shape draw:name="Google Shape;106;p15" draw:style-name="gr3" draw:text-style-name="P14" draw:layer="layout" svg:width="4.968cm" svg:height="2.035cm" svg:x="4.055cm" svg:y="10.906cm">
            <text:p text:style-name="P6"/>
            <draw:enhanced-geometry draw:mirror-horizontal="false" draw:mirror-vertical="false" drawooo:sub-view-size="65726 26923" draw:text-areas="0 0 ?f0 ?f1" svg:viewBox="0 0 0 0" draw:type="ooxml-non-primitive" draw:enhanced-path="M 0 0 L 10782 13477 0 26923 54943 26923 65725 13477 54943 0 Z N">
              <draw:equation draw:name="f0" draw:formula="logwidth"/>
              <draw:equation draw:name="f1" draw:formula="logheight"/>
            </draw:enhanced-geometry>
          </draw:custom-shape>
          <draw:custom-shape draw:name="Google Shape;107;p15" draw:style-name="gr4" draw:text-style-name="P15" draw:layer="layout" svg:width="4.971cm" svg:height="2.035cm" svg:x="8.191cm" svg:y="10.906cm">
            <text:p text:style-name="P6"/>
            <draw:enhanced-geometry draw:mirror-horizontal="false" draw:mirror-vertical="false" drawooo:sub-view-size="65757 26923" draw:text-areas="0 0 ?f0 ?f1" svg:viewBox="0 0 0 0" draw:type="ooxml-non-primitive" draw:enhanced-path="M 0 0 L 10782 13477 0 26923 54975 26923 65757 13477 54975 0 Z N">
              <draw:equation draw:name="f0" draw:formula="logwidth"/>
              <draw:equation draw:name="f1" draw:formula="logheight"/>
            </draw:enhanced-geometry>
          </draw:custom-shape>
          <draw:custom-shape draw:name="Google Shape;108;p15" draw:style-name="gr5" draw:text-style-name="P16" draw:layer="layout" svg:width="4.971cm" svg:height="2.035cm" svg:x="12.327cm" svg:y="10.906cm">
            <text:p text:style-name="P6"/>
            <draw:enhanced-geometry draw:mirror-horizontal="false" draw:mirror-vertical="false" drawooo:sub-view-size="65757 26923" draw:text-areas="0 0 ?f0 ?f1" svg:viewBox="0 0 0 0" draw:type="ooxml-non-primitive" draw:enhanced-path="M 0 0 L 10782 13477 0 26923 54975 26923 65757 13477 54975 0 Z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109;p15" draw:style-name="gr6" draw:text-style-name="P17" draw:layer="layout" svg:width="3.317cm" svg:height="0.931cm" svg:x="5.072cm" svg:y="11.458cm">
          <text:p text:style-name="P6"><text:span text:style-name="T8">CPU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5" draw:style-name="gr6" draw:text-style-name="P17" draw:layer="layout" svg:width="3.317cm" svg:height="0.931cm" svg:x="9.154cm" svg:y="11.458cm">
          <text:p text:style-name="P1"><text:span text:style-name="T9">Torch (CPU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5" draw:style-name="gr6" draw:text-style-name="P17" draw:layer="layout" svg:width="3.317cm" svg:height="1.599cm" svg:x="13.236cm" svg:y="11.124cm">
          <text:p text:style-name="P1"><text:span text:style-name="T9">Basic GPU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5" draw:style-name="gr4" draw:text-style-name="P15" draw:layer="layout" svg:width="4.971cm" svg:height="2.035cm" svg:x="16.384cm" svg:y="10.906cm">
          <text:p text:style-name="P6"/>
          <draw:enhanced-geometry draw:mirror-horizontal="false" draw:mirror-vertical="false" drawooo:sub-view-size="65757 26923" draw:text-areas="0 0 ?f0 ?f1" svg:viewBox="0 0 0 0" draw:type="ooxml-non-primitive" draw:enhanced-path="M 0 0 L 10782 13477 0 26923 54975 26923 65757 13477 54975 0 Z N">
            <draw:equation draw:name="f0" draw:formula="logwidth"/>
            <draw:equation draw:name="f1" draw:formula="logheight"/>
          </draw:enhanced-geometry>
        </draw:custom-shape>
        <draw:custom-shape draw:name="Google Shape;113;p15" draw:style-name="gr6" draw:text-style-name="P17" draw:layer="layout" svg:width="3.317cm" svg:height="1.599cm" svg:x="17.459cm" svg:y="11.124cm">
          <text:p text:style-name="P1"><text:span text:style-name="T9">Optimized</text:span></text:p>
          <text:p text:style-name="P1"><text:span text:style-name="T9">GPU Model</text:span></text:p>
          <text:p text:style-name="P1"><text:span text:style-name="T9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0;g3ef6620537b_0_130:notes" draw:style-name="gr1" draw:layer="layout" svg:width="16.932cm" svg:height="9.524cm" svg:x="1.059cm" svg:y="1.905cm" draw:page-number="3" presentation:class="page"/>
          <draw:frame draw:name="Google Shape;101;g3ef6620537b_0_13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I. CPU Model and Torch" draw:style-name="dp1" draw:master-page-name="TITLE_5f_AND_5f_BODY" presentation:presentation-page-layout-name="AL2T1">
        <draw:frame draw:name="Google Shape;118;p16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6"><text:span text:style-name="T3">III. CPU Model and Torch</text:span></text:p>
          </draw:text-box>
        </draw:frame>
        <draw:frame draw:name="Google Shape;119;p16" presentation:style-name="pr5" draw:text-style-name="P10" draw:layer="layout" svg:width="21.357cm" svg:height="6.28cm" svg:x="2.026cm" svg:y="5.775cm" presentation:class="outline" presentation:user-transformed="true">
          <draw:text-box>
            <text:list text:style-name="L7">
              <text:list-item>
                <text:p text:style-name="P18"><text:span text:style-name="T7">Given equations are implemented in C.</text:span></text:p>
              </text:list-item>
              <text:list-item>
                <text:p text:style-name="P18"><text:span text:style-name="T7">Torch and C version are compared.</text:span></text:p>
              </text:list-item>
            </text:list>
          </draw:text-box>
        </draw:frame>
        <draw:frame draw:name="Google Shape;120;p16" draw:style-name="gr2" draw:text-style-name="P11" draw:layer="layout" svg:width="10.446cm" svg:height="8.967cm" svg:x="13.916cm" svg:y="4.431cm">
          <draw:image xlink:href="Pictures/100000000000036C000002F03C346E231CCEC0C4.png" xlink:type="simple" xlink:show="embed" xlink:actuate="onLoad">
            <text:p/>
          </draw:image>
        </draw:frame>
        <draw:frame draw:name="Google Shape;121;p16" draw:style-name="gr2" draw:text-style-name="P11" draw:layer="layout" svg:width="9.075cm" svg:height="6.015cm" svg:x="2.995cm" svg:y="7.533cm">
          <draw:image xlink:href="Pictures/1000000000000309000002036EDA3527BF3B1478.png" xlink:type="simple" xlink:show="embed" xlink:actuate="onLoad">
            <text:p/>
          </draw:image>
        </draw:frame>
        <presentation:notes draw:style-name="dp2">
          <draw:page-thumbnail draw:name="Google Shape;115;g3ef6620537b_0_611:notes" draw:style-name="gr1" draw:layer="layout" svg:width="16.932cm" svg:height="9.524cm" svg:x="1.059cm" svg:y="1.905cm" draw:page-number="4" presentation:class="page"/>
          <draw:frame draw:name="Google Shape;116;g3ef6620537b_0_611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. Basic GPU Model &#10;" draw:style-name="dp1" draw:master-page-name="TITLE_5f_AND_5f_BODY" presentation:presentation-page-layout-name="AL2T1">
        <draw:frame draw:name="Google Shape;126;p17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6"><text:span text:style-name="T3">V. Basic GPU Model </text:span><text:span text:style-name="T3"><text:line-break/></text:span><text:span text:style-name="T3"/></text:p>
          </draw:text-box>
        </draw:frame>
        <draw:frame draw:name="Google Shape;127;p17" presentation:style-name="pr5" draw:text-style-name="P10" draw:layer="layout" svg:width="21.357cm" svg:height="6.28cm" svg:x="2.026cm" svg:y="5.775cm" presentation:class="outline" presentation:user-transformed="true">
          <draw:text-box>
            <text:list text:style-name="L7">
              <text:list-item>
                <text:p text:style-name="P18"><text:span text:style-name="T7">2 Kernels, Neuron and Synapse</text:span></text:p>
              </text:list-item>
            </text:list>
          </draw:text-box>
        </draw:frame>
        <draw:frame draw:name="Google Shape;128;p17" draw:style-name="gr2" draw:text-style-name="P11" draw:layer="layout" svg:width="8.458cm" svg:height="5.434cm" svg:x="2.908cm" svg:y="7.514cm">
          <draw:image xlink:href="Pictures/100000000000024300000174F998C52F9E7CFFAF.png" xlink:type="simple" xlink:show="embed" xlink:actuate="onLoad">
            <text:p/>
          </draw:image>
        </draw:frame>
        <draw:frame draw:name="Google Shape;129;p17" draw:style-name="gr2" draw:text-style-name="P11" draw:layer="layout" svg:width="9.182cm" svg:height="5.304cm" svg:x="14.091cm" svg:y="7.578cm">
          <draw:image xlink:href="Pictures/1000000000000250000001563E148FF83B952AC8.png" xlink:type="simple" xlink:show="embed" xlink:actuate="onLoad">
            <text:p/>
          </draw:image>
        </draw:frame>
        <presentation:notes draw:style-name="dp2">
          <draw:page-thumbnail draw:name="Google Shape;123;g3ef6620537b_0_616:notes" draw:style-name="gr1" draw:layer="layout" svg:width="16.932cm" svg:height="9.524cm" svg:x="1.059cm" svg:y="1.905cm" draw:page-number="5" presentation:class="page"/>
          <draw:frame draw:name="Google Shape;124;g3ef6620537b_0_616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.  Basic GPU Model (cont’)&#10;&#10;" draw:style-name="dp1" draw:master-page-name="TITLE_5f_AND_5f_BODY" presentation:presentation-page-layout-name="AL2T1">
        <draw:frame draw:name="Google Shape;134;p18" presentation:style-name="pr4" draw:text-style-name="P7" draw:layer="layout" svg:width="21.357cm" svg:height="1.486cm" svg:x="2.021cm" svg:y="1.519cm" presentation:class="title" presentation:user-transformed="true">
          <draw:text-box>
            <text:p text:style-name="P6"><text:span text:style-name="T3">V. <text:s/>Basic GPU Model (cont’)</text:span><text:span text:style-name="T3"><text:line-break/></text:span><text:span text:style-name="T3"><text:line-break/></text:span><text:span text:style-name="T3"/></text:p>
          </draw:text-box>
        </draw:frame>
        <draw:frame draw:name="Google Shape;135;p18" presentation:style-name="pr11" draw:text-style-name="P19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136;p18" draw:style-name="gr2" draw:text-style-name="P11" draw:layer="layout" svg:width="20.285cm" svg:height="10.129cm" svg:x="2.562cm" svg:y="3.85cm">
          <draw:image xlink:href="Pictures/10000000000006400000031F51A4004FD60BCB28.png" xlink:type="simple" xlink:show="embed" xlink:actuate="onLoad">
            <text:p/>
          </draw:image>
        </draw:frame>
        <presentation:notes draw:style-name="dp2">
          <draw:page-thumbnail draw:name="Google Shape;131;g3ef6620537b_0_621:notes" draw:style-name="gr1" draw:layer="layout" svg:width="16.932cm" svg:height="9.524cm" svg:x="1.059cm" svg:y="1.905cm" draw:page-number="6" presentation:class="page"/>
          <draw:frame draw:name="Google Shape;132;g3ef6620537b_0_621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. Optimized GPU Model" draw:style-name="dp1" draw:master-page-name="TITLE_5f_AND_5f_BODY" presentation:presentation-page-layout-name="AL2T1">
        <draw:frame draw:name="Google Shape;141;p19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6"><text:span text:style-name="T3">V. Optimized GPU Model</text:span></text:p>
          </draw:text-box>
        </draw:frame>
        <draw:frame draw:name="Google Shape;142;p19" presentation:style-name="pr5" draw:text-style-name="P10" draw:layer="layout" svg:width="21.357cm" svg:height="6.28cm" svg:x="2.026cm" svg:y="5.775cm" presentation:class="outline" presentation:user-transformed="true">
          <draw:text-box>
            <text:p text:style-name="P8"><text:span text:style-name="T4">Optimization Techniques</text:span></text:p>
            <text:list text:style-name="L8">
              <text:list-item>
                <text:p text:style-name="P13"><text:span text:style-name="T5">Kernel Fusion</text:span></text:p>
              </text:list-item>
              <text:list-item>
                <text:p text:style-name="P8"><text:span text:style-name="T5">Shared Memory Tiling </text:span></text:p>
              </text:list-item>
              <text:list-item>
                <text:p text:style-name="P8"><text:span text:style-name="T5">Vectorized Loads</text:span></text:p>
              </text:list-item>
            </text:list>
          </draw:text-box>
        </draw:frame>
        <draw:frame draw:name="Google Shape;143;p19" draw:style-name="gr2" draw:text-style-name="P11" draw:layer="layout" svg:width="9.034cm" svg:height="7.638cm" svg:x="14.348cm" svg:y="2.823cm">
          <draw:image xlink:href="Pictures/100000000000020C000001BB76D03D1FC479A48E.png" xlink:type="simple" xlink:show="embed" xlink:actuate="onLoad">
            <text:p/>
          </draw:image>
        </draw:frame>
        <draw:frame draw:name="Google Shape;144;p19" draw:style-name="gr2" draw:text-style-name="P11" draw:layer="layout" svg:width="18.114cm" svg:height="1.832cm" svg:x="3.647cm" svg:y="11.239cm">
          <draw:image xlink:href="Pictures/100000000000043F0000006E23D8E0FE885A4944.png" xlink:type="simple" xlink:show="embed" xlink:actuate="onLoad">
            <text:p/>
          </draw:image>
        </draw:frame>
        <presentation:notes draw:style-name="dp2">
          <draw:page-thumbnail draw:name="Google Shape;138;g3ef6620537b_0_649:notes" draw:style-name="gr1" draw:layer="layout" svg:width="16.932cm" svg:height="9.524cm" svg:x="1.059cm" svg:y="1.905cm" draw:page-number="7" presentation:class="page"/>
          <draw:frame draw:name="Google Shape;139;g3ef6620537b_0_649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. Optimized GPU Model (cont’)&#10;" draw:style-name="dp1" draw:master-page-name="TITLE_5f_AND_5f_BODY" presentation:presentation-page-layout-name="AL2T1">
        <draw:frame draw:name="Google Shape;149;p20" presentation:style-name="pr4" draw:text-style-name="P7" draw:layer="layout" svg:width="21.357cm" svg:height="1.486cm" svg:x="2.026cm" svg:y="1.643cm" presentation:class="title" presentation:user-transformed="true">
          <draw:text-box>
            <text:p text:style-name="P6"><text:span text:style-name="T3">V. Optimized GPU Model (cont’)</text:span><text:span text:style-name="T3"><text:line-break/></text:span><text:span text:style-name="T3"/></text:p>
          </draw:text-box>
        </draw:frame>
        <draw:frame draw:name="Google Shape;150;p20" presentation:style-name="pr14" draw:text-style-name="P19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151;p20" draw:style-name="gr2" draw:text-style-name="P11" draw:layer="layout" svg:width="19.187cm" svg:height="9.581cm" svg:x="3.111cm" svg:y="4.124cm">
          <draw:image xlink:href="Pictures/10000000000006400000031F01C980E0DEB5BF10.png" xlink:type="simple" xlink:show="embed" xlink:actuate="onLoad">
            <text:p/>
          </draw:image>
        </draw:frame>
        <presentation:notes draw:style-name="dp2">
          <draw:page-thumbnail draw:name="Google Shape;146;g3ef6620537b_0_659:notes" draw:style-name="gr1" draw:layer="layout" svg:width="16.932cm" svg:height="9.524cm" svg:x="1.059cm" svg:y="1.905cm" draw:page-number="8" presentation:class="page"/>
          <draw:frame draw:name="Google Shape;147;g3ef6620537b_0_659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. Results and Performance Evaluation&#10;" draw:style-name="dp1" draw:master-page-name="TITLE_5f_AND_5f_BODY" presentation:presentation-page-layout-name="AL2T1">
        <draw:frame draw:name="Google Shape;156;p21" presentation:style-name="pr4" draw:text-style-name="P7" draw:layer="layout" svg:width="21.357cm" svg:height="1.486cm" svg:x="2.021cm" svg:y="1.668cm" presentation:class="title" presentation:user-transformed="true">
          <draw:text-box>
            <text:p text:style-name="P6"><text:span text:style-name="T3">VI. Results and Performance Evaluation</text:span><text:span text:style-name="T3"><text:line-break/></text:span><text:span text:style-name="T3"/></text:p>
          </draw:text-box>
        </draw:frame>
        <draw:frame draw:name="Google Shape;157;p21" presentation:style-name="pr16" draw:text-style-name="P19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158;p21" draw:style-name="gr2" draw:text-style-name="P11" draw:layer="layout" svg:width="17.18cm" svg:height="10.309cm" svg:x="4.114cm" svg:y="3.76cm">
          <draw:image xlink:href="Pictures/1000020100000800000004CD7ADEF1BE0F58CFC2.png" xlink:type="simple" xlink:show="embed" xlink:actuate="onLoad">
            <text:p/>
          </draw:image>
        </draw:frame>
        <presentation:notes draw:style-name="dp2">
          <draw:page-thumbnail draw:name="Google Shape;153;g3ef6620537b_0_665:notes" draw:style-name="gr1" draw:layer="layout" svg:width="16.932cm" svg:height="9.524cm" svg:x="1.059cm" svg:y="1.905cm" draw:page-number="9" presentation:class="page"/>
          <draw:frame draw:name="Google Shape;154;g3ef6620537b_0_665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. Results and Performance Evaluation (cont’)&#10;&#10;" draw:style-name="dp1" draw:master-page-name="TITLE_5f_AND_5f_BODY" presentation:presentation-page-layout-name="AL2T1">
        <draw:frame draw:name="Google Shape;163;p22" presentation:style-name="pr4" draw:text-style-name="P7" draw:layer="layout" svg:width="21.663cm" svg:height="1.486cm" svg:x="1.873cm" svg:y="1.394cm" presentation:class="title" presentation:user-transformed="true">
          <draw:text-box>
            <text:p text:style-name="P6"><text:span text:style-name="T3">VI. Results and Performance Evaluation (cont’)</text:span><text:span text:style-name="T3"><text:line-break/></text:span><text:span text:style-name="T3"><text:line-break/></text:span><text:span text:style-name="T3"/></text:p>
          </draw:text-box>
        </draw:frame>
        <draw:frame draw:name="Google Shape;164;p22" presentation:style-name="pr18" draw:text-style-name="P19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165;p22" draw:style-name="gr2" draw:text-style-name="P11" draw:layer="layout" svg:width="18.447cm" svg:height="10.25cm" svg:x="3.481cm" svg:y="3.79cm">
          <draw:image xlink:href="Pictures/100002010000080000000472097DABAFA96B09AF.png" xlink:type="simple" xlink:show="embed" xlink:actuate="onLoad">
            <text:p/>
          </draw:image>
        </draw:frame>
        <presentation:notes draw:style-name="dp2">
          <draw:page-thumbnail draw:name="Google Shape;160;g3ef6620537b_0_674:notes" draw:style-name="gr1" draw:layer="layout" svg:width="16.932cm" svg:height="9.524cm" svg:x="1.059cm" svg:y="1.905cm" draw:page-number="10" presentation:class="page"/>
          <draw:frame draw:name="Google Shape;161;g3ef6620537b_0_674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. Results and Performance Evaluation (cont’)&#10;&#10;" draw:style-name="dp1" draw:master-page-name="TITLE_5f_AND_5f_BODY" presentation:presentation-page-layout-name="AL2T1">
        <draw:frame draw:name="Google Shape;170;p23" presentation:style-name="pr4" draw:text-style-name="P7" draw:layer="layout" svg:width="21.61cm" svg:height="1.486cm" svg:x="1.895cm" svg:y="1.643cm" presentation:class="title" presentation:user-transformed="true">
          <draw:text-box>
            <text:p text:style-name="P6"><text:span text:style-name="T3">VI. Results and Performance Evaluation (cont’)</text:span><text:span text:style-name="T3"><text:line-break/></text:span><text:span text:style-name="T3"><text:line-break/></text:span><text:span text:style-name="T3"/></text:p>
          </draw:text-box>
        </draw:frame>
        <draw:frame draw:name="Google Shape;171;p23" presentation:style-name="pr20" draw:text-style-name="P19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172;p23" draw:style-name="gr2" draw:text-style-name="P11" draw:layer="layout" svg:width="23.373cm" svg:height="8.148cm" svg:x="1.013cm" svg:y="4.841cm">
          <draw:image xlink:href="Pictures/1000020100000800000002CA89C1FD4085A513A2.png" xlink:type="simple" xlink:show="embed" xlink:actuate="onLoad">
            <text:p/>
          </draw:image>
        </draw:frame>
        <presentation:notes draw:style-name="dp2">
          <draw:page-thumbnail draw:name="Google Shape;167;g3ef6620537b_0_680:notes" draw:style-name="gr1" draw:layer="layout" svg:width="16.932cm" svg:height="9.524cm" svg:x="1.059cm" svg:y="1.905cm" draw:page-number="11" presentation:class="page"/>
          <draw:frame draw:name="Google Shape;168;g3ef6620537b_0_680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I. Discussions" draw:style-name="dp1" draw:master-page-name="TITLE_5f_AND_5f_BODY" presentation:presentation-page-layout-name="AL2T1">
        <draw:frame draw:name="Google Shape;177;p24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6"><text:span text:style-name="T3">VII. Discussions</text:span></text:p>
          </draw:text-box>
        </draw:frame>
        <draw:frame draw:name="Google Shape;178;p24" presentation:style-name="pr5" draw:text-style-name="P10" draw:layer="layout" svg:width="21.357cm" svg:height="6.28cm" svg:x="2.026cm" svg:y="5.775cm" presentation:class="outline" presentation:user-transformed="true">
          <draw:text-box>
            <text:list text:style-name="L7">
              <text:list-item>
                <text:p text:style-name="P18"><text:span text:style-name="T7">Up to 112.7 times lower latency.</text:span></text:p>
              </text:list-item>
              <text:list-item>
                <text:p text:style-name="P18"><text:span text:style-name="T7">Memory bandwidth bottleneck and saturation point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5">The Optimized and the Basic versions converge at the high number of neurons (N = 16386)</text:span></text:p>
                  </text:list-item>
                </text:list>
              </text:list-item>
              <text:list-item>
                <text:p text:style-name="P18"><text:span text:style-name="T7">Matrix transposition and sparsity</text:span></text:p>
                <text:list>
                  <text:list-item>
                    <text:p text:style-name="P18"><text:span text:style-name="T5">W[i*n +j] —&gt; <text:s/>W[j*n + i] </text:span><text:span text:style-name="T5"><text:tab/></text:span></text:p>
                  </text:list-item>
                </text:list>
              </text:list-item>
              <text:list-item>
                <text:p text:style-name="P18"><text:span text:style-name="T7">Related works</text:span></text:p>
                <text:list>
                  <text:list-item>
                    <text:p text:style-name="P18"><text:span text:style-name="T5">CARLsim6, and GeN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4;g3ef6620537b_0_687:notes" draw:style-name="gr1" draw:layer="layout" svg:width="16.932cm" svg:height="9.524cm" svg:x="1.059cm" svg:y="1.905cm" draw:page-number="12" presentation:class="page"/>
          <draw:frame draw:name="Google Shape;175;g3ef6620537b_0_687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II. Future Work&#10;" draw:style-name="dp1" draw:master-page-name="TITLE_5f_AND_5f_BODY" presentation:presentation-page-layout-name="AL2T1">
        <draw:frame draw:name="Google Shape;183;p25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6"><text:span text:style-name="T3">VIII. Future Work</text:span><text:span text:style-name="T3"><text:line-break/></text:span><text:span text:style-name="T3"/></text:p>
          </draw:text-box>
        </draw:frame>
        <draw:frame draw:name="Google Shape;184;p25" presentation:style-name="pr5" draw:text-style-name="P10" draw:layer="layout" svg:width="21.357cm" svg:height="6.28cm" svg:x="2.026cm" svg:y="5.775cm" presentation:class="outline" presentation:user-transformed="true">
          <draw:text-box>
            <text:list text:style-name="L7">
              <text:list-item>
                <text:p text:style-name="P18"><text:span text:style-name="T7">Solid Proof-of-Concept</text:span></text:p>
              </text:list-item>
              <text:list-item>
                <text:p text:style-name="P18"><text:span text:style-name="T7">More generic </text:span></text:p>
              </text:list-item>
              <text:list-item>
                <text:p text:style-name="P18"><text:span text:style-name="T7">Code generator script</text:span></text:p>
              </text:list-item>
              <text:list-item>
                <text:p text:style-name="P18"><text:span text:style-name="T7">NIR (Neuromorphic Intermediate Representation) can be used </text:span></text:p>
              </text:list-item>
            </text:list>
          </draw:text-box>
        </draw:frame>
        <presentation:notes draw:style-name="dp2">
          <draw:page-thumbnail draw:name="Google Shape;180;g3ef6620537b_0_700:notes" draw:style-name="gr1" draw:layer="layout" svg:width="16.932cm" svg:height="9.524cm" svg:x="1.059cm" svg:y="1.905cm" draw:page-number="13" presentation:class="page"/>
          <draw:frame draw:name="Google Shape;181;g3ef6620537b_0_700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3"/>
    <meta:generator>LibreOfficeDev/6.0.5.2$Linux_X86_64 LibreOffice_project/</meta:generator>
  </office:meta>
</office:document-meta>
</file>